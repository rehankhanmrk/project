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officeooo:rsid="000bd87b" officeooo:paragraph-rsid="000bd87b" style:font-size-asian="18.3500003814697pt" style:font-weight-asian="bold" style:font-size-complex="21pt" style:font-weight-complex="bold"/>
    </style:style>
    <style:style style:name="P2" style:family="paragraph" style:parent-style-name="Standard">
      <style:text-properties fo:font-size="13pt" fo:font-weight="normal" officeooo:rsid="000bd87b" officeooo:paragraph-rsid="000bd87b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dfec3" officeooo:paragraph-rsid="000dfec3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32a12" officeooo:paragraph-rsid="0014f62d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32a12" officeooo:paragraph-rsid="0019fca2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5921b" officeooo:paragraph-rsid="0015921b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style="normal" fo:font-weight="normal" officeooo:rsid="000cebf5" officeooo:paragraph-rsid="000cebf5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fo:font-weight="normal" officeooo:rsid="000dfec3" officeooo:paragraph-rsid="000dfec3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fo:font-weight="normal" officeooo:rsid="00102ff8" officeooo:paragraph-rsid="00102ff8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fo:font-weight="normal" officeooo:rsid="0015921b" officeooo:paragraph-rsid="0015921b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fo:font-weight="normal" officeooo:rsid="0016972d" officeooo:paragraph-rsid="0016972d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fo:font-weight="normal" officeooo:rsid="00180447" officeooo:paragraph-rsid="00180447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fo:font-weight="normal" officeooo:rsid="00116c5e" officeooo:paragraph-rsid="00116c5e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fo:font-weight="normal" officeooo:rsid="00132a12" officeooo:paragraph-rsid="00132a12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size="13pt" fo:font-style="normal" fo:font-weight="normal" officeooo:rsid="0014f62d" officeooo:paragraph-rsid="0014f62d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fo:font-weight="normal" officeooo:rsid="0019fca2" officeooo:paragraph-rsid="0019fca2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fo:font-weight="normal" officeooo:rsid="0019fca2" officeooo:paragraph-rsid="001bc535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3pt" fo:font-style="normal" fo:font-weight="normal" officeooo:rsid="001bccd8" officeooo:paragraph-rsid="001bccd8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text-properties fo:font-size="13pt" fo:font-style="normal" fo:font-weight="normal" officeooo:rsid="001c6b06" officeooo:paragraph-rsid="001c6b06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font-size="13pt" fo:font-style="normal" fo:font-weight="normal" officeooo:rsid="001cca4b" officeooo:paragraph-rsid="001cca4b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fo:font-size="13pt" fo:font-style="normal" fo:font-weight="normal" officeooo:rsid="001eb7f5" officeooo:paragraph-rsid="001eb7f5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text-properties fo:font-size="13pt" fo:font-style="normal" fo:font-weight="normal" officeooo:rsid="001f296b" officeooo:paragraph-rsid="001f296b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text-properties fo:font-size="13pt" fo:font-style="normal" fo:font-weight="normal" officeooo:rsid="00206594" officeooo:paragraph-rsid="00206594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text-properties fo:font-size="13pt" fo:font-style="normal" fo:font-weight="normal" officeooo:rsid="00207c84" officeooo:paragraph-rsid="00207c84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text-properties fo:font-size="13pt" fo:font-style="normal" fo:font-weight="normal" officeooo:rsid="0020e088" officeooo:paragraph-rsid="0020e088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fo:font-size="13pt" fo:font-style="normal" fo:font-weight="normal" officeooo:rsid="00226b36" officeooo:paragraph-rsid="00226b36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fo:font-size="13pt" fo:font-style="normal" fo:font-weight="normal" officeooo:rsid="00227dbb" officeooo:paragraph-rsid="00227dbb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fo:font-size="13pt" fo:font-style="normal" fo:font-weight="normal" officeooo:rsid="0022aa47" officeooo:paragraph-rsid="0022aa47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size="13pt" fo:font-style="normal" fo:font-weight="normal" officeooo:rsid="00233590" officeooo:paragraph-rsid="00233590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fo:font-weight="normal" officeooo:rsid="0023bb03" officeooo:paragraph-rsid="0023bb03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Text_20_body">
      <style:text-properties fo:font-size="13pt" fo:font-style="normal" fo:font-weight="normal" officeooo:rsid="002c4231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fo:font-weight="bold" officeooo:rsid="0015921b" officeooo:paragraph-rsid="0015921b" style:font-size-asian="11.3500003814697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text-properties fo:font-size="13pt" fo:font-style="normal" fo:font-weight="bold" officeooo:rsid="00116c5e" officeooo:paragraph-rsid="00116c5e" style:font-size-asian="11.3500003814697pt" style:font-style-asian="normal" style:font-weight-asian="bold" style:font-size-complex="13pt" style:font-style-complex="normal" style:font-weight-complex="bold"/>
    </style:style>
    <style:style style:name="P34" style:family="paragraph" style:parent-style-name="Text_20_body">
      <style:text-properties fo:font-size="13pt" fo:font-style="normal" fo:font-weight="bold" officeooo:rsid="002c4231" style:font-size-asian="11.3500003814697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text-properties fo:font-weight="normal" style:font-weight-asian="normal" style:font-weight-complex="normal"/>
    </style:style>
    <style:style style:name="P36" style:family="paragraph" style:parent-style-name="Standard">
      <style:text-properties fo:font-weight="normal" officeooo:rsid="003099ef" officeooo:paragraph-rsid="003099ef" style:font-weight-asian="normal" style:font-weight-complex="normal"/>
    </style:style>
    <style:style style:name="P37" style:family="paragraph" style:parent-style-name="Standard">
      <style:text-properties fo:font-weight="normal" officeooo:rsid="00372b6e" officeooo:paragraph-rsid="00372b6e" style:font-weight-asian="normal" style:font-weight-complex="normal"/>
    </style:style>
    <style:style style:name="P38" style:family="paragraph" style:parent-style-name="Standard">
      <style:text-properties fo:font-weight="normal" officeooo:rsid="00385690" officeooo:paragraph-rsid="00385690" style:font-weight-asian="normal" style:font-weight-complex="normal"/>
    </style:style>
    <style:style style:name="P39" style:family="paragraph" style:parent-style-name="Standard">
      <style:text-properties fo:font-weight="normal" officeooo:rsid="003b2eb2" officeooo:paragraph-rsid="003b2eb2" style:font-weight-asian="normal" style:font-weight-complex="normal"/>
    </style:style>
    <style:style style:name="P40" style:family="paragraph" style:parent-style-name="Standard">
      <style:text-properties fo:font-weight="normal" officeooo:rsid="003f3c88" officeooo:paragraph-rsid="003f3c88" style:font-weight-asian="normal" style:font-weight-complex="normal"/>
    </style:style>
    <style:style style:name="P41" style:family="paragraph" style:parent-style-name="Standard">
      <style:text-properties fo:font-weight="normal" officeooo:rsid="0040fc69" officeooo:paragraph-rsid="0040fc69" style:font-weight-asian="normal" style:font-weight-complex="normal"/>
    </style:style>
    <style:style style:name="P42" style:family="paragraph" style:parent-style-name="Standard">
      <style:text-properties fo:font-weight="normal" officeooo:rsid="004153c5" officeooo:paragraph-rsid="004153c5" style:font-weight-asian="normal" style:font-weight-complex="normal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text-properties fo:font-weight="bold" officeooo:rsid="00312f55" officeooo:paragraph-rsid="00312f55" style:font-weight-asian="bold" style:font-weight-complex="bold"/>
    </style:style>
    <style:style style:name="P45" style:family="paragraph" style:parent-style-name="Standard">
      <style:text-properties fo:font-weight="bold" officeooo:rsid="00372b6e" officeooo:paragraph-rsid="00372b6e" style:font-weight-asian="bold" style:font-weight-complex="bold"/>
    </style:style>
    <style:style style:name="P46" style:family="paragraph" style:parent-style-name="Standard">
      <style:text-properties fo:font-weight="bold" officeooo:rsid="00385690" officeooo:paragraph-rsid="00385690" style:font-weight-asian="bold" style:font-weight-complex="bold"/>
    </style:style>
    <style:style style:name="P47" style:family="paragraph" style:parent-style-name="Standard">
      <style:text-properties fo:font-weight="bold" officeooo:rsid="0039eb65" officeooo:paragraph-rsid="0039eb65" style:font-weight-asian="bold" style:font-weight-complex="bold"/>
    </style:style>
    <style:style style:name="P48" style:family="paragraph" style:parent-style-name="Standard">
      <style:text-properties fo:font-weight="bold" officeooo:rsid="003f3c88" officeooo:paragraph-rsid="003f3c88" style:font-weight-asian="bold" style:font-weight-complex="bold"/>
    </style:style>
    <style:style style:name="P49" style:family="paragraph" style:parent-style-name="Standard">
      <style:text-properties fo:font-weight="bold" officeooo:rsid="0042d0f3" officeooo:paragraph-rsid="004153c5" style:font-weight-asian="bold" style:font-weight-complex="bold"/>
    </style:style>
    <style:style style:name="P50" style:family="paragraph" style:parent-style-name="Standard">
      <style:text-properties fo:font-weight="bold" officeooo:rsid="0042d0f3" officeooo:paragraph-rsid="0042d0f3" style:font-weight-asian="bold" style:font-weight-complex="bold"/>
    </style:style>
    <style:style style:name="P51" style:family="paragraph" style:parent-style-name="Standard">
      <style:text-properties officeooo:rsid="00312f55" officeooo:paragraph-rsid="00312f55"/>
    </style:style>
    <style:style style:name="P52" style:family="paragraph" style:parent-style-name="Standard">
      <style:text-properties officeooo:rsid="00372b6e" officeooo:paragraph-rsid="00312f55"/>
    </style:style>
    <style:style style:name="P53" style:family="paragraph" style:parent-style-name="Standard">
      <style:text-properties officeooo:rsid="0039eb65" officeooo:paragraph-rsid="0039eb65"/>
    </style:style>
    <style:style style:name="P54" style:family="paragraph" style:parent-style-name="Standard">
      <style:text-properties officeooo:rsid="0039eb65" officeooo:paragraph-rsid="003b2eb2"/>
    </style:style>
    <style:style style:name="P55" style:family="paragraph" style:parent-style-name="Standard">
      <style:text-properties officeooo:rsid="0039eb65" officeooo:paragraph-rsid="003c6eae"/>
    </style:style>
    <style:style style:name="P56" style:family="paragraph" style:parent-style-name="Standard">
      <style:text-properties officeooo:rsid="003b2eb2" officeooo:paragraph-rsid="003b2eb2"/>
    </style:style>
    <style:style style:name="P57" style:family="paragraph" style:parent-style-name="Standard">
      <style:text-properties officeooo:rsid="003c6eae" officeooo:paragraph-rsid="003c6eae"/>
    </style:style>
    <style:style style:name="P58" style:family="paragraph" style:parent-style-name="Standard">
      <style:text-properties officeooo:rsid="0043c5a9" officeooo:paragraph-rsid="0042d0f3"/>
    </style:style>
    <style:style style:name="P59" style:family="paragraph" style:parent-style-name="Standard">
      <style:text-properties officeooo:rsid="00459bdd" officeooo:paragraph-rsid="00459bdd"/>
    </style:style>
    <style:style style:name="P60" style:family="paragraph" style:parent-style-name="Standard">
      <style:text-properties fo:font-weight="bold" officeooo:rsid="0045c15d" officeooo:paragraph-rsid="0045c15d" style:font-weight-asian="bold" style:font-weight-complex="bold"/>
    </style:style>
    <style:style style:name="P61" style:family="paragraph" style:parent-style-name="Standard">
      <style:text-properties fo:font-weight="bold" officeooo:rsid="0045ecbc" officeooo:paragraph-rsid="0045ecbc" style:font-weight-asian="bold" style:font-weight-complex="bold"/>
    </style:style>
    <style:style style:name="P62" style:family="paragraph" style:parent-style-name="Standard">
      <style:text-properties fo:font-weight="bold" officeooo:rsid="0045ecbc" officeooo:paragraph-rsid="0046a589" style:font-weight-asian="bold" style:font-weight-complex="bold"/>
    </style:style>
    <style:style style:name="P63" style:family="paragraph" style:parent-style-name="Standard">
      <style:text-properties fo:font-weight="bold" officeooo:rsid="00474e7b" officeooo:paragraph-rsid="00474e7b" style:font-weight-asian="bold" style:font-weight-complex="bold"/>
    </style:style>
    <style:style style:name="P64" style:family="paragraph" style:parent-style-name="Standard">
      <style:text-properties fo:font-weight="normal" officeooo:rsid="003f3c88" officeooo:paragraph-rsid="003f3c88" style:font-weight-asian="normal" style:font-weight-complex="normal"/>
    </style:style>
    <style:style style:name="P65" style:family="paragraph" style:parent-style-name="Standard">
      <style:text-properties fo:font-weight="normal" officeooo:rsid="0048e8bc" officeooo:paragraph-rsid="0048e8bc" style:font-weight-asian="normal" style:font-weight-complex="normal"/>
    </style:style>
    <style:style style:name="P66" style:family="paragraph" style:parent-style-name="Standard">
      <style:text-properties officeooo:rsid="004c6b1d" officeooo:paragraph-rsid="004c6b1d"/>
    </style:style>
    <style:style style:name="P67" style:family="paragraph" style:parent-style-name="Standard">
      <style:text-properties officeooo:rsid="004f4c97" officeooo:paragraph-rsid="004f4c9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ebf5" style:font-style-asian="normal" style:font-style-complex="normal"/>
    </style:style>
    <style:style style:name="T3" style:family="text">
      <style:text-properties fo:font-style="normal" officeooo:rsid="000e3b6a" style:font-style-asian="normal" style:font-style-complex="normal"/>
    </style:style>
    <style:style style:name="T4" style:family="text">
      <style:text-properties fo:font-style="normal" officeooo:rsid="0014f62d" style:font-style-asian="normal" style:font-style-complex="normal"/>
    </style:style>
    <style:style style:name="T5" style:family="text">
      <style:text-properties fo:font-style="normal" officeooo:rsid="0016972d" style:font-style-asian="normal" style:font-style-complex="normal"/>
    </style:style>
    <style:style style:name="T6" style:family="text">
      <style:text-properties fo:font-style="normal" officeooo:rsid="002a67eb" style:font-style-asian="normal" style:font-style-complex="normal"/>
    </style:style>
    <style:style style:name="T7" style:family="text">
      <style:text-properties fo:font-style="normal" officeooo:rsid="003099ef" style:font-style-asian="normal" style:font-style-complex="normal"/>
    </style:style>
    <style:style style:name="T8" style:family="text">
      <style:text-properties fo:font-style="normal" officeooo:rsid="00372b6e" style:font-style-asian="normal" style:font-style-complex="normal"/>
    </style:style>
    <style:style style:name="T9" style:family="text">
      <style:text-properties officeooo:rsid="001bc535"/>
    </style:style>
    <style:style style:name="T10" style:family="text">
      <style:text-properties officeooo:rsid="001bccd8"/>
    </style:style>
    <style:style style:name="T11" style:family="text">
      <style:text-properties officeooo:rsid="001d4315"/>
    </style:style>
    <style:style style:name="T12" style:family="text">
      <style:text-properties officeooo:rsid="001f296b"/>
    </style:style>
    <style:style style:name="T13" style:family="text">
      <style:text-properties officeooo:rsid="0024cb83"/>
    </style:style>
    <style:style style:name="T14" style:family="text">
      <style:text-properties officeooo:rsid="0026b1c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2721f"/>
    </style:style>
    <style:style style:name="T17" style:family="text">
      <style:text-properties officeooo:rsid="00385690"/>
    </style:style>
    <style:style style:name="T18" style:family="text">
      <style:text-properties officeooo:rsid="003c6eae"/>
    </style:style>
    <style:style style:name="T19" style:family="text">
      <style:text-properties officeooo:rsid="0040fc69"/>
    </style:style>
    <style:style style:name="T20" style:family="text">
      <style:text-properties style:text-position="super 58%"/>
    </style:style>
    <style:style style:name="T21" style:family="text">
      <style:text-properties officeooo:rsid="0045ecbc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fo:font-variant="normal" fo:text-transform="none" fo:color="#202124" loext:opacity="100%" style:font-name="Google Sans" fo:font-size="15pt" fo:letter-spacing="normal" fo:font-style="normal"/>
    </style:style>
    <style:style style:name="T24" style:family="text">
      <style:text-properties fo:font-variant="normal" fo:text-transform="none" fo:color="#040c28" loext:opacity="100%" style:font-name="Google Sans" fo:font-size="15pt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RAFORM</text:p>
      <text:p text:style-name="P2"/>
      <text:p text:style-name="P2">Terraform mean extra terrestrial word it is a <text:span text:style-name="T1">IAC (Infrastructure As Code) tools </text:span></text:p>
      <text:p text:style-name="P2"><text:span text:style-name="T1">It is open source .</text:span><text:span text:style-name="T2">Invented by Mitchel hashimot0 </text:span></text:p>
      <text:p text:style-name="P7">Terraform is useful in case of multiple cloud it is used in HCL (Hashicorp Configure Language) </text:p>
      <text:p text:style-name="P7">it is similar to JSON </text:p>
      <text:p text:style-name="P3"><text:span text:style-name="T1">IAC </text:span><text:span text:style-name="T3">(Infrastructure As Code)</text:span><text:span text:style-name="T1"> tools is the managing and provisioning of infrast</text:span><text:span text:style-name="T8">ruct</text:span><text:span text:style-name="T1">ure through code.</text:span></text:p>
      <text:p text:style-name="P8"/>
      <text:p text:style-name="P9">Two ways of approach of <text:s/>IAC tools </text:p>
      <text:p text:style-name="P9">1. Imperative</text:p>
      <text:p text:style-name="P9">2. Declarative</text:p>
      <text:p text:style-name="P9"/>
      <text:p text:style-name="P9">Imperative means step by step dependency</text:p>
      <text:p text:style-name="P9"/>
      <text:p text:style-name="P9">Declarative mean every step if not stepwise </text:p>
      <text:p text:style-name="P9"/>
      <text:p text:style-name="P9">Terraform is a declarative approach </text:p>
      <text:p text:style-name="P9">Cloudformation is a Imperative approach</text:p>
      <text:p text:style-name="P9"/>
      <text:p text:style-name="P32">aws need for terraform</text:p>
      <text:p text:style-name="P32"/>
      <text:p text:style-name="P10">1.Access key and secret key with user in aws </text:p>
      <text:p text:style-name="P6"><text:span text:style-name="T1">2. go to </text:span><text:span text:style-name="T5">aws home then search IAM </text:span><text:span text:style-name="T6">(identiy access management)</text:span><text:span text:style-name="T5"> in aws</text:span></text:p>
      <text:p text:style-name="P11">3. then click IAM and then click user button and click Add users then click next </text:p>
      <text:p text:style-name="P11">4. setup permission click Attach policies directly and then search AdministratorAccess and click.</text:p>
      <text:p text:style-name="P12">5.then click next and click create users and then show key and download key</text:p>
      <text:p text:style-name="P33"/>
      <text:p text:style-name="P33"/>
      <text:p text:style-name="P33"/>
      <text:p text:style-name="P33">Terraform basic command</text:p>
      <text:p text:style-name="P33"/>
      <text:p text:style-name="P13">terraform init = for start and initializing <text:span text:style-name="T13">&amp; for download plugin from providers</text:span></text:p>
      <text:p text:style-name="P13">terraform plan = setup step by step planing</text:p>
      <text:p text:style-name="P13">terraform validate = output error show </text:p>
      <text:p text:style-name="P13">terraform apply = execute and ready code</text:p>
      <text:p text:style-name="P13">terraform destroy = delete all terraform</text:p>
      <text:p text:style-name="P13"/>
      <text:p text:style-name="P14">syntax:</text:p>
      <text:p text:style-name="P14"/>
      <text:p text:style-name="P4"><text:span text:style-name="T1">&lt;blocktype&gt;”&lt;</text:span><text:span text:style-name="T4">blocklable</text:span><text:span text:style-name="T1">&gt;”</text:span><text:span text:style-name="T4">&lt;blocklable&gt;” {</text:span></text:p>
      <text:p text:style-name="P15">&lt;identifier&gt;=&lt;expression&gt;</text:p>
      <text:p text:style-name="P15">}</text:p>
      <text:p text:style-name="P15"><text:soft-page-break/></text:p>
      <text:p text:style-name="P5"><text:span text:style-name="T4">resource</text:span><text:span text:style-name="T1">”</text:span><text:span text:style-name="T4">awsintance</text:span><text:span text:style-name="T1">”</text:span><text:span text:style-name="T4">any name e.g=S1” {</text:span></text:p>
      <text:p text:style-name="P15">intance_type=”t2micro”</text:p>
      <text:p text:style-name="P15">}</text:p>
      <text:p text:style-name="P16"/>
      <text:p text:style-name="P16">every file write in .tf exten<text:span text:style-name="T9">s</text:span>ion</text:p>
      <text:p text:style-name="P16"/>
      <text:p text:style-name="P16"><text:span text:style-name="T9">multiple block in </text:span>create terraformfile </text:p>
      <text:p text:style-name="P16"/>
      <text:p text:style-name="P16"><text:span text:style-name="T10">$ </text:span>sudo nano file1.tf</text:p>
      <text:p text:style-name="P15"/>
      <text:p text:style-name="P16">output”firstoutputblock” {</text:p>
      <text:p text:style-name="P16"><text:tab/>value = “Hello-world”</text:p>
      <text:p text:style-name="P16">}</text:p>
      <text:p text:style-name="P16"/>
      <text:p text:style-name="P17">output”<text:span text:style-name="T9">2nd</text:span>outputblock” {</text:p>
      <text:p text:style-name="P17"><text:tab/>value = “Hello-world”</text:p>
      <text:p text:style-name="P17">}</text:p>
      <text:p text:style-name="P17"/>
      <text:p text:style-name="P17">output”<text:span text:style-name="T9">3rd</text:span>outputblock” {</text:p>
      <text:p text:style-name="P17"><text:tab/>value = “Hello-world”</text:p>
      <text:p text:style-name="P17">}</text:p>
      <text:p text:style-name="P17"/>
      <text:p text:style-name="P17">output ”<text:span text:style-name="T9">4th</text:span>outputblock” {</text:p>
      <text:p text:style-name="P17"><text:tab/>value = “Hello-world”</text:p>
      <text:p text:style-name="P17">}</text:p>
      <text:p text:style-name="P17"/>
      <text:p text:style-name="P18">create infra command </text:p>
      <text:p text:style-name="P18">$ terraform plan </text:p>
      <text:p text:style-name="P19">+</text:p>
      <text:p text:style-name="P19">+</text:p>
      <text:p text:style-name="P19">+</text:p>
      <text:p text:style-name="P19">$</text:p>
      <text:p text:style-name="P20">we create new repo in github from terraform</text:p>
      <text:p text:style-name="P20"/>
      <text:p text:style-name="P20">$ sudo nano github.tf</text:p>
      <text:p text:style-name="P20"/>
      <text:p text:style-name="P20">provider "github" {</text:p>
      <text:p text:style-name="P20"><text:s text:c="2"/>token = "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"</text:p>
      <text:p text:style-name="P20">}</text:p>
      <text:p text:style-name="P20"><text:tab/></text:p>
      <text:p text:style-name="P20">resource "github_repository" "terraform_githubrepo" {</text:p>
      <text:p text:style-name="P20"><text:s text:c="2"/>name <text:s text:c="7"/>= "terraformrepo" <text:s text:c="3"/><text:span text:style-name="T11">#github repo name</text:span></text:p>
      <text:p text:style-name="P20"><text:s text:c="2"/>description = "My first github repo from terraform"</text:p>
      <text:p text:style-name="P20"/>
      <text:p text:style-name="P20"><text:soft-page-break/><text:s text:c="2"/>visibility = "public"</text:p>
      <text:p text:style-name="P20"><text:s text:c="2"/>auto_init = true <text:s text:c="5"/><text:span text:style-name="T11">#auto­_init to create Readme.mod file</text:span></text:p>
      <text:p text:style-name="P20"/>
      <text:p text:style-name="P20">}</text:p>
      <text:p text:style-name="P20"/>
      <text:p text:style-name="P20"/>
      <text:p text:style-name="P21">$ terraform apply</text:p>
      <text:p text:style-name="P21">O/P</text:p>
      <text:p text:style-name="P21"/>
      <text:p text:style-name="P21">Enter a value = click yes</text:p>
      <text:p text:style-name="P21"/>
      <text:p text:style-name="P21">Apply complete! Resources: 1 added, 0 changed, 0 destroyed.</text:p>
      <text:p text:style-name="P21"/>
      <text:p text:style-name="P21">$</text:p>
      <text:p text:style-name="P22">create second repo in github from terraform</text:p>
      <text:p text:style-name="P22"/>
      <text:p text:style-name="P22">$ sudo nano github.tf </text:p>
      <text:p text:style-name="P22"/>
      <text:p text:style-name="P22">provider "github" {</text:p>
      <text:p text:style-name="P22"><text:s text:c="2"/>token = "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"</text:p>
      <text:p text:style-name="P22">}</text:p>
      <text:p text:style-name="P22"/>
      <text:p text:style-name="P22">resource "github_repository" "terraform_githubrepo" {</text:p>
      <text:p text:style-name="P22"><text:s text:c="2"/>name <text:s text:c="7"/>= "terraformrepo"</text:p>
      <text:p text:style-name="P22"><text:s text:c="2"/>description = "My first github repo from terraform"</text:p>
      <text:p text:style-name="P22"/>
      <text:p text:style-name="P22"><text:s text:c="2"/>visibility = "public"</text:p>
      <text:p text:style-name="P22"><text:s text:c="2"/>auto_init = true</text:p>
      <text:p text:style-name="P22"/>
      <text:p text:style-name="P22">}</text:p>
      <text:p text:style-name="P22"/>
      <text:p text:style-name="P22">resource "github_repository" "Terraform_GithubSecondRepo" {</text:p>
      <text:p text:style-name="P22"><text:s text:c="2"/>name <text:s text:c="7"/>= "terraformrepo2"</text:p>
      <text:p text:style-name="P22"><text:s text:c="2"/>description = "My second github repo from terraform"</text:p>
      <text:p text:style-name="P22"/>
      <text:p text:style-name="P22"><text:s text:c="2"/>visibility = "public"</text:p>
      <text:p text:style-name="P22"><text:s text:c="2"/>auto_init = true</text:p>
      <text:p text:style-name="P22"/>
      <text:p text:style-name="P22">}</text:p>
      <text:p text:style-name="P22"/>
      <text:p text:style-name="P22"/>
      <text:p text:style-name="P23">$ terraform plan</text:p>
      <text:p text:style-name="P23">+</text:p>
      <text:p text:style-name="P23">+</text:p>
      <text:p text:style-name="P23">+</text:p>
      <text:p text:style-name="P23"><text:soft-page-break/>$ terraform apply –auto-approve <text:tab/># --auto-approve for not asking Enter a value = click yes</text:p>
      <text:p text:style-name="P23"/>
      <text:p text:style-name="P23">O/P</text:p>
      <text:p text:style-name="P23"/>
      <text:p text:style-name="P23">Apply complete! Resources: 1 added, 0 changed, 0 destroyed.</text:p>
      <text:p text:style-name="P23"/>
      <text:p text:style-name="P24">$ terraform destroy # all delete terraform</text:p>
      <text:p text:style-name="P24"/>
      <text:p text:style-name="P24">destroy (delete) choose terraform:-</text:p>
      <text:p text:style-name="P24">--target command used for choose terraform delete</text:p>
      <text:p text:style-name="P24">$ terraform destroy –target block.blocklable</text:p>
      <text:p text:style-name="P24">$ terraform destroy –target <text:s/><text:span text:style-name="T12">github_repository.Terraform_GithubSecondRepo</text:span></text:p>
      <text:p text:style-name="P25"/>
      <text:p text:style-name="P25">refresh terraform command:-</text:p>
      <text:p text:style-name="P25">$ terraform refresh</text:p>
      <text:p text:style-name="P25"/>
      <text:p text:style-name="P25">show terraform <text:span text:style-name="T14">in which create</text:span> resource:- </text:p>
      <text:p text:style-name="P25">$ terraform show</text:p>
      <text:p text:style-name="P26"/>
      <text:p text:style-name="P26">sign:-</text:p>
      <text:p text:style-name="P26">+ sign to add</text:p>
      <text:p text:style-name="P26">- sign to destroy</text:p>
      <text:p text:style-name="P26">~ sign to update</text:p>
      <text:p text:style-name="P26"/>
      <text:p text:style-name="P27">see your repository github url </text:p>
      <text:p text:style-name="P27">we go to terraform providers</text:p>
      <text:p text:style-name="P27">click github_repository and then In see Attribute Reference</text:p>
      <text:p text:style-name="P27">in Attribute Reference see html_url copy it .</text:p>
      <text:p text:style-name="P27">And then go to terraform file (github.tf) </text:p>
      <text:p text:style-name="P27">$ sudo nano github.tf</text:p>
      <text:p text:style-name="P27"><text:s/></text:p>
      <text:p text:style-name="P27">provider "github" {</text:p>
      <text:p text:style-name="P27"><text:s text:c="2"/>token = "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"</text:p>
      <text:p text:style-name="P27">}</text:p>
      <text:p text:style-name="P27"/>
      <text:p text:style-name="P27">resource "github_repository" "terraform_githubrepo" {</text:p>
      <text:p text:style-name="P27"><text:s text:c="2"/>name <text:s text:c="7"/>= "terraformrepo"</text:p>
      <text:p text:style-name="P27"><text:s text:c="2"/>description = "My first github repo from terraform"</text:p>
      <text:p text:style-name="P27"/>
      <text:p text:style-name="P27"><text:s text:c="2"/>visibility = "public"</text:p>
      <text:p text:style-name="P27"><text:s text:c="2"/>auto_init = true</text:p>
      <text:p text:style-name="P27"/>
      <text:p text:style-name="P27">}</text:p>
      <text:p text:style-name="P27"/>
      <text:p text:style-name="P27">#resource "github_repository" "Terraform_GithubSecondRepo" {</text:p>
      <text:p text:style-name="P27"><text:soft-page-break/># <text:s/>name <text:s text:c="7"/>= "terraformrepo2"</text:p>
      <text:p text:style-name="P27"># <text:s/>description = "My second github repo from terraform"</text:p>
      <text:p text:style-name="P27">#</text:p>
      <text:p text:style-name="P27"># <text:s/>auto_init = true</text:p>
      <text:p text:style-name="P27"/>
      <text:p text:style-name="P27">#}</text:p>
      <text:p text:style-name="P27"/>
      <text:p text:style-name="P27">output "terraform_first_repo_url" {</text:p>
      <text:p text:style-name="P27"><text:s text:c="2"/>value = github_repository.terraform_githubrepo.html_url</text:p>
      <text:p text:style-name="P27">}</text:p>
      <text:p text:style-name="P27"><text:s/></text:p>
      <text:p text:style-name="P28">$ terraform validate</text:p>
      <text:p text:style-name="P29">O/p</text:p>
      <text:p text:style-name="P28">Success! The configuration is valid.</text:p>
      <text:p text:style-name="P29">$ terraform plan</text:p>
      <text:p text:style-name="P29">O/p</text:p>
      <text:p text:style-name="P29"/>
      <text:p text:style-name="P29">github_repository.terraform_githubrepo: Refreshing state... [id=terraformrepo]</text:p>
      <text:p text:style-name="P29"/>
      <text:p text:style-name="P29">Changes to Outputs:</text:p>
      <text:p text:style-name="P29"><text:s text:c="2"/>+ terraform_first_repo_url = "https://github.com/rehankhanmrk/terraformrepo"</text:p>
      <text:p text:style-name="P29"/>
      <text:p text:style-name="P29">You can apply this plan to save these new output values to the Terraform state, without changing any real infrastructure.</text:p>
      <text:p text:style-name="P29"/>
      <text:p text:style-name="P29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29"/>
      <text:p text:style-name="P29">Note: You didn't use the -out option to save this plan, so Terraform can't guarantee to take exactly these actions if you run</text:p>
      <text:p text:style-name="P29">"terraform apply" now.</text:p>
      <text:p text:style-name="P29"/>
      <text:p text:style-name="P29"/>
      <text:p text:style-name="P30">Just see url from output :-</text:p>
      <text:p text:style-name="P30">$ terraform output terraform_first_repo_url</text:p>
      <text:p text:style-name="P30">O/p</text:p>
      <text:p text:style-name="P30">"<text:a xlink:type="simple" xlink:href="https://github.com/rehankhanmrk/terraformrepo" text:style-name="Internet_20_link" text:visited-style-name="Visited_20_Internet_20_Link">https://github.com/rehankhanmrk/terraformrepo</text:a>"</text:p>
      <text:p text:style-name="P30">$ terraform output first_output_block</text:p>
      <text:p text:style-name="P30">O/p</text:p>
      <text:p text:style-name="P30">"Hello-world"</text:p>
      <text:p text:style-name="P30"/>
      <text:p text:style-name="P30"><text:s text:c="3"/></text:p>
      <text:p text:style-name="P30"/>
      <text:p text:style-name="P34">create security group in aws:-</text:p>
      <text:p text:style-name="P31"><text:soft-page-break/>security_group create from dynamic block we go to https://developer.hashicorp.com/terraform/language/expressions/dynamic-blocks</text:p>
      <text:p text:style-name="Standard"/>
      <text:p text:style-name="Standard">In terraform file write here</text:p>
      <text:p text:style-name="Standard">$ sudo nano instance.tf</text:p>
      <text:p text:style-name="Standard"/>
      <text:p text:style-name="Standard">resource "aws_security_group" "allow_tls" {</text:p>
      <text:p text:style-name="Standard"><text:s text:c="2"/>name <text:s text:c="7"/>= "allow_tls"</text:p>
      <text:p text:style-name="Standard"><text:s text:c="2"/>description = "Allow TLS inbound traffic"</text:p>
      <text:p text:style-name="Standard"><text:s text:c="2"/>dynamic "ingress" { <text:tab/><text:tab/><text:span text:style-name="T16">#ingress mean inbount</text:span></text:p>
      <text:p text:style-name="Standard"><text:s text:c="4"/>for_each = [22,443,80,3000]</text:p>
      <text:p text:style-name="Standard"><text:s text:c="4"/>iterator = port</text:p>
      <text:p text:style-name="Standard"><text:s text:c="4"/>content {</text:p>
      <text:p text:style-name="Standard"><text:s text:c="8"/>description <text:s text:c="5"/>= "TLS from VPC"</text:p>
      <text:p text:style-name="Standard"><text:s text:c="8"/>from_port <text:s text:c="7"/>= port.value</text:p>
      <text:p text:style-name="Standard"><text:s text:c="8"/>to_port <text:s text:c="9"/>= port.value</text:p>
      <text:p text:style-name="Standard"><text:s text:c="8"/>protocol <text:s text:c="8"/>= "tcp"</text:p>
      <text:p text:style-name="Standard"><text:s text:c="8"/>cidr_blocks <text:s text:c="5"/>= ["0.0.0.0/0"]</text:p>
      <text:p text:style-name="Standard"><text:s text:c="4"/>}</text:p>
      <text:p text:style-name="Standard"/>
      <text:p text:style-name="Standard"><text:s text:c="2"/>}</text:p>
      <text:p text:style-name="Standard"/>
      <text:p text:style-name="Standard">$ terraform apply –auto-approve</text:p>
      <text:p text:style-name="Standard">O/p</text:p>
      <text:p text:style-name="Standard">done</text:p>
      <text:p text:style-name="Standard">$ terraform destroy –auto-approve</text:p>
      <text:p text:style-name="Standard">done</text:p>
      <text:p text:style-name="Standard">$</text:p>
      <text:p text:style-name="Standard"/>
      <text:p text:style-name="P43">CREATE KEY_PAIR IN AWS FROM TERRAFORM:-</text:p>
      <text:p text:style-name="P35"/>
      <text:p text:style-name="P35">copy public_key in this directory where is this terraformfile</text:p>
      <text:p text:style-name="P35">$ cp ~/.ssh/id_rsa.pub <text:span text:style-name="T15">/</text:span><text:span text:style-name="T7">h</text:span><text:span text:style-name="T15">ome</text:span><text:span text:style-name="T1">/rehan/terraform/instance</text:span></text:p>
      <text:p text:style-name="P36">$</text:p>
      <text:p text:style-name="P36">$ sudo nano intance.tf</text:p>
      <text:p text:style-name="Standard"><text:s/></text:p>
      <text:p text:style-name="Standard">resource "aws_key_pair" "key_tf" {</text:p>
      <text:p text:style-name="Standard"><text:s text:c="2"/>key_name <text:s text:c="2"/>= "deploy_key"</text:p>
      <text:p text:style-name="Standard"><text:s text:c="2"/>public_key = file("${path.module}/id_rsa.pub")</text:p>
      <text:p text:style-name="Standard">}</text:p>
      <text:p text:style-name="P51">$</text:p>
      <text:p text:style-name="P44">path.module:-</text:p>
      <text:p text:style-name="P51">path.module :- show file in output </text:p>
      <text:p text:style-name="P51"/>
      <text:p text:style-name="P52"/>
      <text:p text:style-name="P45">PROVISIONER:-</text:p>
      <text:p text:style-name="P45"/>
      <text:p text:style-name="P37">provisioner means configuration activities executing shell/script <text:span text:style-name="T17">executing cli command</text:span></text:p>
      <text:p text:style-name="P46"><text:soft-page-break/>TYPE:-</text:p>
      <text:p text:style-name="P38">1.file </text:p>
      <text:p text:style-name="P38">2. local exec</text:p>
      <text:p text:style-name="P38">3. remote exec</text:p>
      <text:p text:style-name="Standard"/>
      <text:p text:style-name="P47">FOR-EXAMPLE:-</text:p>
      <text:p text:style-name="P39">#connect ssh intance</text:p>
      <text:p text:style-name="P53"/>
      <text:p text:style-name="P53"><text:s text:c="2"/>connection {</text:p>
      <text:p text:style-name="P53"><text:s text:c="4"/>type = "ssh"</text:p>
      <text:p text:style-name="P53"><text:s text:c="4"/>user = "ubuntu"</text:p>
      <text:p text:style-name="P53"><text:s text:c="4"/>private_key = file("${path.module}/id_rsa")</text:p>
      <text:p text:style-name="P53"><text:s text:c="4"/>host = "${self.public_ip}"</text:p>
      <text:p text:style-name="P53"><text:s text:c="2"/>}</text:p>
      <text:p text:style-name="P53"/>
      <text:p text:style-name="P56"># copy Readme.md file in /tmp folder</text:p>
      <text:p text:style-name="P54"/>
      <text:p text:style-name="P54"><text:s text:c="2"/>provisioner "file" {</text:p>
      <text:p text:style-name="P53"><text:s text:c="5"/>source = "Readme.md"</text:p>
      <text:p text:style-name="P53"><text:s text:c="5"/>destination = "/tmp/"</text:p>
      <text:p text:style-name="P53"><text:s text:c="2"/>}</text:p>
      <text:p text:style-name="P53"/>
      <text:p text:style-name="P56"># write content/text in content.md file </text:p>
      <text:p text:style-name="P53"/>
      <text:p text:style-name="P53"><text:s text:c="2"/>provisioner "file" {</text:p>
      <text:p text:style-name="P53"><text:s text:c="4"/>content = "this is my first content/text in provisioner file"</text:p>
      <text:p text:style-name="P53"><text:s text:c="4"/>destination = "/tmp/content.md"</text:p>
      <text:p text:style-name="P53"><text:s text:c="2"/>}</text:p>
      <text:p text:style-name="P55"><text:span text:style-name="T18"># exucute command </text:span><text:s/></text:p>
      <text:p text:style-name="P55"><text:s/>provisioner "local-exec" {</text:p>
      <text:p text:style-name="P53"><text:s text:c="4"/>command = "echo ${self.public_ip} &gt;/<text:span text:style-name="T18">tmp/</text:span>mypublic_ip_in_tmp.txt"</text:p>
      <text:p text:style-name="P53"><text:s text:c="2"/>}</text:p>
      <text:p text:style-name="P53"/>
      <text:p text:style-name="P57"># interpreter </text:p>
      <text:p text:style-name="P53"><text:s text:c="2"/>provisioner "local-exec" {</text:p>
      <text:p text:style-name="P53"><text:s text:c="4"/>interpreter = [ </text:p>
      <text:p text:style-name="P53"><text:s text:c="5"/>"/usr/bin/phyton3","-c"</text:p>
      <text:p text:style-name="P53"><text:s text:c="5"/>]</text:p>
      <text:p text:style-name="P53"><text:s text:c="5"/>command = "print('hello rehan')"</text:p>
      <text:p text:style-name="P53"><text:s text:c="2"/>}</text:p>
      <text:p text:style-name="P53"/>
      <text:p text:style-name="P53"/>
      <text:p text:style-name="P48">TERRAFORM WORKSPACE:-</text:p>
      <text:p text:style-name="P40"/>
      <text:p text:style-name="P40"><text:span text:style-name="T23">Workspace is </text:span><text:span text:style-name="T24">a way to maintain multiple copies of deployments that can be created and destroyed on the go</text:span><text:span text:style-name="T23">.</text:span></text:p>
      <text:p text:style-name="P65"/>
      <text:p text:style-name="P40"/>
      <text:p text:style-name="P40"><text:soft-page-break/>terraform workspace commands:-</text:p>
      <text:p text:style-name="P40"/>
      <text:p text:style-name="P40">see terraform workspace:-</text:p>
      <text:p text:style-name="P40">$ terraform workspace list</text:p>
      <text:p text:style-name="P40"/>
      <text:p text:style-name="P40">create new workspace:-</text:p>
      <text:p text:style-name="P40">$ terraform workspace new dev</text:p>
      <text:p text:style-name="P40"/>
      <text:p text:style-name="P40">present workspace:-</text:p>
      <text:p text:style-name="P40"/>
      <text:p text:style-name="P40">$ terraform <text:span text:style-name="T19">workspace</text:span> show</text:p>
      <text:p text:style-name="P40"><text:s/></text:p>
      <text:p text:style-name="P41">go to different workspace switch 2<text:span text:style-name="T20">nd</text:span> workspace:-</text:p>
      <text:p text:style-name="P41"/>
      <text:p text:style-name="P41">$ terraform workspace select dev</text:p>
      <text:p text:style-name="P41"/>
      <text:p text:style-name="P42">delete dev workspace:-</text:p>
      <text:p text:style-name="P42">first of all switch different workspace not switch workspace for example $ terraform workspace select default</text:p>
      <text:p text:style-name="P42"/>
      <text:p text:style-name="P42">$ terraform workspace delete dev</text:p>
      <text:p text:style-name="P42"/>
      <text:p text:style-name="P49"/>
      <text:p text:style-name="P50">TERRAFORM MODULE:-</text:p>
      <text:p text:style-name="P58"/>
      <text:p text:style-name="P66">Terraform module is a set of terraform configuration files in a single directory.</text:p>
      <text:p text:style-name="P67">We observed that the same resource code we are using multiple times in different project.</text:p>
      <text:p text:style-name="P6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dsl modem isp ppt patch=???</text:p>
      <text:p text:style-name="P59"/>
      <text:p text:style-name="P59"/>
      <text:p text:style-name="P59"/>
      <text:p text:style-name="P60">TERRAFORM FILE terraform.tfstat<text:span text:style-name="T21">e pull our system:</text:span></text:p>
      <text:p text:style-name="P61">first of all your backend block content do comment</text:p>
      <text:p text:style-name="P61">for example:</text:p>
      <text:p text:style-name="P62"><text:s/></text:p>
      <text:p text:style-name="P62">terraform {</text:p>
      <text:p text:style-name="P61"><text:s text:c="3"/>backend "s3" {</text:p>
      <text:p text:style-name="P61"><text:s text:c="5"/>bucket = "terraform.tfstate"</text:p>
      <text:p text:style-name="P61"><text:soft-page-break/><text:s text:c="5"/>region = "us-east-1"</text:p>
      <text:p text:style-name="P61"><text:s text:c="5"/>key = "terraform.tfstate"</text:p>
      <text:p text:style-name="P61"><text:s text:c="3"/>}</text:p>
      <text:p text:style-name="P61"><text:s/>}</text:p>
      <text:p text:style-name="P61"/>
      <text:p text:style-name="P61"/>
      <text:p text:style-name="P61"># <text:s/>terraform {</text:p>
      <text:p text:style-name="P61"># <text:s text:c="3"/>backend "s3" {</text:p>
      <text:p text:style-name="P61"># <text:s text:c="5"/>bucket = "terraform.tfstate"</text:p>
      <text:p text:style-name="P61"># <text:s text:c="5"/>region = "us-east-1"</text:p>
      <text:p text:style-name="P61"># <text:s text:c="5"/>key = "terraform.tfstate"</text:p>
      <text:p text:style-name="P61"># <text:s text:c="3"/>}</text:p>
      <text:p text:style-name="P61"># <text:s/>}</text:p>
      <text:p text:style-name="P61"/>
      <text:p text:style-name="P63">$ terraform init <text:span text:style-name="T22">-migrate-state</text:span> </text:p>
      <text:p text:style-name="P63">done</text:p>
      <text:p text:style-name="P63">our terraform.tfstate file pull in local server</text:p>
      <text:p text:style-name="P63"/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5:13:05.423206669</meta:creation-date>
    <dc:date>2023-05-12T20:03:41.135590633</dc:date>
    <meta:editing-duration>PT10H52M1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9" meta:paragraph-count="265" meta:word-count="1081" meta:character-count="7895" meta:non-whitespace-character-count="6711"/>
  </office:meta>
</office:document-meta>
</file>